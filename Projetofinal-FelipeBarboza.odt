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1181D563E92.jpg" manifest:media-type="image/jpeg"/>
  <manifest:file-entry manifest:full-path="Pictures/100000010000014B00000035E109D7BD.png" manifest:media-type="image/png"/>
  <manifest:file-entry manifest:full-path="Pictures/10000001000003340000022D6D3C76FA.png" manifest:media-type="image/png"/>
  <manifest:file-entry manifest:full-path="Pictures/100000010000032F0000022580902E6E.png" manifest:media-type="image/png"/>
  <manifest:file-entry manifest:full-path="Pictures/1000000100000328000000990A192E54.png" manifest:media-type="image/png"/>
  <manifest:file-entry manifest:full-path="Pictures/100000010000033200000222CE847633.png" manifest:media-type="image/png"/>
  <manifest:file-entry manifest:full-path="Pictures/100000010000033500000222F7554D1B.png" manifest:media-type="image/png"/>
  <manifest:file-entry manifest:full-path="Pictures/10000001000003130000010056B7EDDB.png" manifest:media-type="image/png"/>
  <manifest:file-entry manifest:full-path="Pictures/1000000100000317000000F8A884EDD4.png" manifest:media-type="image/png"/>
  <manifest:file-entry manifest:full-path="Pictures/100000010000032F000002254E1ACC07.png" manifest:media-type="image/png"/>
  <manifest:file-entry manifest:full-path="Pictures/10000001000003090000021B25A694DD.png" manifest:media-type="image/png"/>
  <manifest:file-entry manifest:full-path="Pictures/10000001000003090000021B8B6CC74B.png" manifest:media-type="image/png"/>
  <manifest:file-entry manifest:full-path="Pictures/10000000000001690000016AE3AA8E61.jpg" manifest:media-type="image/jpeg"/>
  <manifest:file-entry manifest:full-path="Pictures/100000010000032B000001A8EEC6496B.png" manifest:media-type="image/png"/>
  <manifest:file-entry manifest:full-path="Pictures/100000010000034B0000019DA70F153D.png" manifest:media-type="image/png"/>
  <manifest:file-entry manifest:full-path="Pictures/1000000100000317000000F8BBFFAD06.png" manifest:media-type="image/png"/>
  <manifest:file-entry manifest:full-path="Pictures/1000000100000324000001CAE8E6CD98.png" manifest:media-type="image/png"/>
  <manifest:file-entry manifest:full-path="Pictures/100000010000032F000002258D0E6B32.png" manifest:media-type="image/png"/>
  <manifest:file-entry manifest:full-path="Pictures/1000000100000266000000EA3B622FCE.png" manifest:media-type="image/png"/>
  <manifest:file-entry manifest:full-path="Pictures/10000001000003090000021B5B7DDFC4.png" manifest:media-type="image/png"/>
  <manifest:file-entry manifest:full-path="Pictures/10000001000001FE000000A0C82DDA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AIAL" svg:font-family="ARAIAL"/>
    <style:font-face style:name="Araial" svg:font-family="Ara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7.119cm" fo:margin-left="-0.018cm" style:page-number="auto" table:align="left"/>
    </style:style>
    <style:style style:name="Table1.A" style:family="table-column">
      <style:table-column-properties style:column-width="2.415cm"/>
    </style:style>
    <style:style style:name="Table1.B" style:family="table-column">
      <style:table-column-properties style:column-width="11.264cm"/>
    </style:style>
    <style:style style:name="Table1.C" style:family="table-column">
      <style:table-column-properties style:column-width="3.44cm"/>
    </style:style>
    <style:style style:name="Table1.A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1pt solid #000001" style:writing-mode="lr-tb">
        <style:background-image/>
      </style:table-cell-properties>
    </style:style>
    <style:style style:name="P1" style:family="paragraph" style:parent-style-name="Rodapé">
      <style:paragraph-properties fo:text-align="center" style:justify-single-word="false"/>
    </style:style>
    <style:style style:name="P2" style:family="paragraph" style:parent-style-name="Standard">
      <style:paragraph-properties fo:margin-top="0.071cm" fo:margin-bottom="0.071cm" style:contextual-spacing="false"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Rodapé">
      <style:text-properties officeooo:paragraph-rsid="00346b96"/>
    </style:style>
    <style:style style:name="P5" style:family="paragraph" style:parent-style-name="Standard">
      <style:text-properties fo:font-size="10.5pt" fo:font-weight="bold" officeooo:paragraph-rsid="0030c567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top="0.071cm" fo:margin-bottom="0.071cm" style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346b96" officeooo:paragraph-rsid="0034ca87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0.5pt" fo:font-weight="normal" officeooo:rsid="00346b96" officeooo:paragraph-rsid="00346b96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break-before="page"/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fo:font-weight="normal" officeooo:rsid="0037f80e" officeooo:paragraph-rsid="003509f9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.071cm" fo:margin-bottom="0.071cm" style:contextual-spacing="false" fo:text-align="center" style:justify-single-word="false"/>
      <style:text-properties fo:font-size="10.5pt" style:font-size-asian="10.5pt" style:font-size-complex="10.5pt"/>
    </style:style>
    <style:style style:name="P15" style:family="paragraph" style:parent-style-name="Standard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weight-complex="bold"/>
    </style:style>
    <style:style style:name="P16" style:family="paragraph" style:parent-style-name="Standard">
      <style:text-properties officeooo:paragraph-rsid="0030c567"/>
    </style:style>
    <style:style style:name="P17" style:family="paragraph" style:parent-style-name="Standard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size="10.5pt" fo:font-weight="normal" officeooo:paragraph-rsid="003d4aea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font-size="10.5pt" fo:font-weight="normal" officeooo:paragraph-rsid="003509f9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font-size="10.5pt" fo:font-weight="normal" officeooo:rsid="003509f9" officeooo:paragraph-rsid="003509f9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3509f9" officeooo:paragraph-rsid="003d4aea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font-size="10.5pt" fo:font-weight="bold" officeooo:paragraph-rsid="0030c567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AIAL" fo:font-size="14pt" fo:font-weight="bold" officeooo:rsid="00131a0c" officeooo:paragraph-rsid="003b6a8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AIAL" fo:font-size="14pt" fo:font-weight="bold" officeooo:rsid="001ed7a7" officeooo:paragraph-rsid="003b6a8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AIAL" fo:font-size="16pt" fo:font-weight="bold" officeooo:rsid="00131a0c" officeooo:paragraph-rsid="003b6a81" style:font-size-asian="16pt" style:font-weight-asian="bold" style:font-size-complex="16pt" style:font-weight-complex="bold"/>
    </style:style>
    <style:style style:name="P26" style:family="paragraph" style:parent-style-name="Text_20_body">
      <style:text-properties fo:font-size="10.5pt" fo:font-weight="normal" officeooo:paragraph-rsid="0030c567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fo:font-size="10.5pt" fo:font-weight="normal" officeooo:rsid="00346b96" officeooo:paragraph-rsid="0034ca87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officeooo:paragraph-rsid="003509f9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bold" style:font-size-asian="10.5pt" style:font-size-complex="10.5pt"/>
    </style:style>
    <style:style style:name="T4" style:family="text">
      <style:text-properties fo:font-size="10.5pt" fo:font-weight="normal" style:font-size-asian="10.5pt" style:font-weight-asian="normal" style:font-name-complex="Times New Roman" style:font-size-complex="10.5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d4aea" style:font-weight-asian="bold" style:font-weight-complex="bold"/>
    </style:style>
    <style:style style:name="T8" style:family="text">
      <style:text-properties fo:font-weight="bold" officeooo:rsid="004302b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AIAL" fo:font-size="14pt" fo:font-weight="bold" officeooo:rsid="00131a0c" style:font-size-asian="14pt" style:font-weight-asian="bold" style:font-name-complex="Times New Roman" style:font-size-complex="14pt" style:font-weight-complex="bold"/>
    </style:style>
    <style:style style:name="T11" style:family="text">
      <style:text-properties style:font-name="ARAIAL" fo:font-size="12pt" fo:font-weight="normal" officeooo:rsid="00131a0c" style:font-size-asian="10.5pt" style:font-weight-asian="normal" style:font-name-complex="Times New Roman" style:font-size-complex="12pt" style:font-weight-complex="normal"/>
    </style:style>
    <style:style style:name="T12" style:family="text">
      <style:text-properties style:font-name="Arai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 Copy 1" text:anchor-type="page" text:anchor-page-number="2" svg:x="2.512cm" svg:y="9.186cm" svg:width="15cm" svg:height="10.012cm" draw:z-index="20">
        <draw:image xlink:href="Pictures/100000010000033200000222CE847633.png" xlink:type="simple" xlink:show="embed" xlink:actuate="onLoad" draw:mime-type="image/png"/>
      </draw:frame>
      <draw:frame draw:style-name="fr1" draw:name="Image18" text:anchor-type="page" text:anchor-page-number="10" svg:x="2.757cm" svg:y="2.785cm" svg:width="15cm" svg:height="9.975cm" draw:z-index="18">
        <draw:image xlink:href="Pictures/100000010000033500000222F7554D1B.png" xlink:type="simple" xlink:show="embed" xlink:actuate="onLoad" draw:mime-type="image/png"/>
      </draw:frame>
      <draw:frame draw:style-name="fr1" draw:name="Image17" text:anchor-type="page" text:anchor-page-number="9" svg:x="2.672cm" svg:y="18.381cm" svg:width="15cm" svg:height="7.84cm" draw:z-index="17">
        <draw:image xlink:href="Pictures/100000010000032B000001A8EEC6496B.png" xlink:type="simple" xlink:show="embed" xlink:actuate="onLoad" draw:mime-type="image/png"/>
      </draw:frame>
      <draw:frame draw:style-name="fr1" draw:name="Image16" text:anchor-type="page" text:anchor-page-number="9" svg:x="2.766cm" svg:y="13.257cm" svg:width="15cm" svg:height="4.879cm" draw:z-index="16">
        <draw:image xlink:href="Pictures/10000001000003130000010056B7EDDB.png" xlink:type="simple" xlink:show="embed" xlink:actuate="onLoad" draw:mime-type="image/png"/>
      </draw:frame>
      <draw:frame draw:style-name="fr1" draw:name="Image15" text:anchor-type="page" text:anchor-page-number="9" svg:x="2.87cm" svg:y="2.369cm" svg:width="15cm" svg:height="10.405cm" draw:z-index="15">
        <draw:image xlink:href="Pictures/10000001000003090000021B25A694DD.png" xlink:type="simple" xlink:show="embed" xlink:actuate="onLoad" draw:mime-type="image/png"/>
      </draw:frame>
      <draw:frame draw:style-name="fr1" draw:name="Image14" text:anchor-type="page" text:anchor-page-number="8" svg:x="3.009cm" svg:y="12.977cm" svg:width="15cm" svg:height="10.405cm" draw:z-index="14">
        <draw:image xlink:href="Pictures/10000001000003090000021B8B6CC74B.png" xlink:type="simple" xlink:show="embed" xlink:actuate="onLoad" draw:mime-type="image/png"/>
      </draw:frame>
      <draw:frame draw:style-name="fr3" draw:name="Image13" text:anchor-type="page" text:anchor-page-number="8" svg:x="0cm" svg:y="0cm" svg:width="15cm" svg:height="10.405cm" draw:z-index="13">
        <draw:image xlink:href="Pictures/10000001000003090000021B5B7DDFC4.png" xlink:type="simple" xlink:show="embed" xlink:actuate="onLoad" draw:mime-type="image/png"/>
      </draw:frame>
      <draw:frame draw:style-name="fr1" draw:name="Image12" text:anchor-type="page" text:anchor-page-number="7" svg:x="2.506cm" svg:y="16.822cm" svg:width="15cm" svg:height="4.703cm" draw:z-index="12">
        <draw:image xlink:href="Pictures/1000000100000317000000F8BBFFAD06.png" xlink:type="simple" xlink:show="embed" xlink:actuate="onLoad" draw:mime-type="image/png"/>
      </draw:frame>
      <draw:frame draw:style-name="fr1" draw:name="Image11" text:anchor-type="page" text:anchor-page-number="7" svg:x="2.591cm" svg:y="11.67cm" svg:width="15cm" svg:height="4.703cm" draw:z-index="11">
        <draw:image xlink:href="Pictures/1000000100000317000000F8A884EDD4.png" xlink:type="simple" xlink:show="embed" xlink:actuate="onLoad" draw:mime-type="image/png"/>
      </draw:frame>
      <draw:frame draw:style-name="fr1" draw:name="Image10 Copy 1" text:anchor-type="page" text:anchor-page-number="7" svg:x="2.785cm" svg:y="2.339cm" svg:width="15cm" svg:height="8.544cm" draw:z-index="10">
        <draw:image xlink:href="Pictures/1000000100000324000001CAE8E6CD98.png" xlink:type="simple" xlink:show="embed" xlink:actuate="onLoad" draw:mime-type="image/png"/>
      </draw:frame>
      <draw:frame draw:style-name="fr1" draw:name="Image9" text:anchor-type="page" text:anchor-page-number="6" svg:x="2.868cm" svg:y="14.011cm" svg:width="15cm" svg:height="5.715cm" draw:z-index="9">
        <draw:image xlink:href="Pictures/1000000100000266000000EA3B622FCE.png" xlink:type="simple" xlink:show="embed" xlink:actuate="onLoad" draw:mime-type="image/png"/>
      </draw:frame>
      <draw:frame draw:style-name="fr1" draw:name="Image8" text:anchor-type="page" text:anchor-page-number="6" svg:x="2.868cm" svg:y="4.542cm" svg:width="15cm" svg:height="7.348cm" draw:z-index="8">
        <draw:image xlink:href="Pictures/100000010000034B0000019DA70F153D.png" xlink:type="simple" xlink:show="embed" xlink:actuate="onLoad" draw:mime-type="image/png"/>
      </draw:frame>
      <draw:frame draw:style-name="fr1" draw:name="Image7" text:anchor-type="page" text:anchor-page-number="5" svg:x="2.896cm" svg:y="18.715cm" svg:width="13.494cm" svg:height="4.233cm" draw:z-index="7">
        <draw:image xlink:href="Pictures/10000001000001FE000000A0C82DDA34.png" xlink:type="simple" xlink:show="embed" xlink:actuate="onLoad" draw:mime-type="image/png"/>
      </draw:frame>
      <draw:frame draw:style-name="fr1" draw:name="Image6" text:anchor-type="page" text:anchor-page-number="5" svg:x="2.983cm" svg:y="12.151cm" svg:width="15cm" svg:height="2.84cm" draw:z-index="6">
        <draw:image xlink:href="Pictures/1000000100000328000000990A192E54.png" xlink:type="simple" xlink:show="embed" xlink:actuate="onLoad" draw:mime-type="image/png"/>
      </draw:frame>
      <draw:frame draw:style-name="fr3" draw:name="Image4" text:anchor-type="page" text:anchor-page-number="5" svg:x="0cm" svg:y="0cm" svg:width="15cm" svg:height="10.104cm" draw:z-index="5">
        <draw:image xlink:href="Pictures/100000010000032F000002254E1ACC07.png" xlink:type="simple" xlink:show="embed" xlink:actuate="onLoad" draw:mime-type="image/png"/>
      </draw:frame>
      <draw:frame draw:style-name="fr1" draw:name="Image5" text:anchor-type="page" text:anchor-page-number="4" svg:x="3.007cm" svg:y="12.256cm" svg:width="15cm" svg:height="10.104cm" draw:z-index="4">
        <draw:image xlink:href="Pictures/100000010000032F000002258D0E6B32.png" xlink:type="simple" xlink:show="embed" xlink:actuate="onLoad" draw:mime-type="image/png"/>
      </draw:frame>
      <draw:frame draw:style-name="fr3" draw:name="Image3" text:anchor-type="page" text:anchor-page-number="4" svg:x="0cm" svg:y="0cm" svg:width="15cm" svg:height="10.104cm" draw:z-index="3">
        <draw:image xlink:href="Pictures/100000010000032F0000022580902E6E.png" xlink:type="simple" xlink:show="embed" xlink:actuate="onLoad" draw:mime-type="image/png"/>
      </draw:frame>
      <draw:frame draw:style-name="fr1" draw:name="Image2" text:anchor-type="page" text:anchor-page-number="3" svg:x="2.787cm" svg:y="2.785cm" svg:width="15cm" svg:height="10.188cm" draw:z-index="2">
        <draw:image xlink:href="Pictures/10000001000003340000022D6D3C76FA.png" xlink:type="simple" xlink:show="embed" xlink:actuate="onLoad" draw:mime-type="image/png"/>
      </draw:frame>
      <draw:frame draw:style-name="fr1" draw:name="Image19" text:anchor-type="page" text:anchor-page-number="10" svg:x="2.923cm" svg:y="14.395cm" svg:width="8.758cm" svg:height="1.402cm" draw:z-index="19">
        <draw:image xlink:href="Pictures/100000010000014B00000035E109D7BD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draw:frame draw:style-name="fr2" draw:name="figuras1" text:anchor-type="as-char" svg:y="0.483cm" svg:width="1.647cm" style:rel-width="scale" svg:height="1.655cm" style:rel-height="scale" draw:z-index="0"><draw:image xlink:href="Pictures/10000000000001690000016AE3AA8E61.jpg" xlink:type="simple" xlink:show="embed" xlink:actuate="onLoad" draw:mime-type="image/jpeg"/></draw:frame></text:p>
            <text:p text:style-name="P14"/>
          </table:table-cell>
          <table:table-cell table:style-name="Table1.A1" office:value-type="string">
            <text:p text:style-name="P14">Ministério da Educação</text:p>
            <text:p text:style-name="P6">UNIVERSIDADE TECNOLÓGICA FEDERAL DO PARANÁ</text:p>
            <text:p text:style-name="P15">Campus Guarapuava</text:p>
          </table:table-cell>
          <table:table-cell table:style-name="Table1.A1" office:value-type="string">
            <text:p text:style-name="P3"><draw:frame draw:style-name="fr2" draw:name="figuras2" text:anchor-type="as-char" svg:y="0cm" svg:width="3.161cm" style:rel-width="scale" svg:height="1.154cm" style:rel-height="scale" draw:z-index="1"><draw:image xlink:href="Pictures/10000000000002FE000001181D563E92.jpg" xlink:type="simple" xlink:show="embed" xlink:actuate="onLoad" draw:mime-type="image/jpeg"/></draw:frame></text:p>
          </table:table-cell>
        </table:table-row>
      </table:table>
      <text:p text:style-name="P25"/>
      <text:p text:style-name="P25">UNIVERSIDADE TECNOLÓGICA FEDERAL <text:span text:style-name="T12">DO</text:span> PARANÁ</text:p>
      <text:p text:style-name="P25"/>
      <text:p text:style-name="P25">FELIPE NOVOCHADLO PIRES BARBOZ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PROJETO FINAL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Fonte_20_parág._20_padrão"><text:span text:style-name="T10">GUARAPUAVA<text:line-break/></text:span></text:span><text:span text:style-name="Fonte_20_parág._20_padrão"><text:span text:style-name="T11">2026</text:span></text:span></text:p>
      <text:p text:style-name="P16"><text:soft-page-break/><text:span text:style-name="Fonte_20_parág._20_padrão"><text:span text:style-name="T4"/></text:span></text:p>
      <text:p text:style-name="P16"><text:span text:style-name="Fonte_20_parág._20_padrão"><text:span text:style-name="T4"/></text:span></text:p>
      <text:p text:style-name="P5">O comando top - <text:span text:style-name="T9">este comando exibe em tempo real informações sobre seu sistema Linux, processos em andamento e recursos do sistema, incluídos CPU, memória RAM e uso do swap, além do número total de tarefas sendo executadas </text:span></text:p>
      <text:p text:style-name="P5"><text:span text:style-name="T9"/></text:p>
      <text:p text:style-name="P5">Exercício A: </text:p>
      <text:p text:style-name="P8"><text:span text:style-name="T9"/></text:p>
      <text:p text:style-name="P8">O comando <text:span text:style-name="Strong_20_Emphasis"><text:span text:style-name="T9">top</text:span></text:span> exibe, em tempo real, informações sobre o sistema e os processos em execução. No cabeçalho, mostra dados como horário atual, tempo de atividade do sistema, usuários conectados, carga média, uso de CPU, memória RAM e swap. A tabela lista os processos com informações como PID, usuário, prioridade, consumo de CPU e memória, tempo de execução e comando executado. Esses valores mudam constantemente devido ao gerenciamento dos processos pelo sistema operacional. Para encerrar o <text:span text:style-name="Strong_20_Emphasis"><text:span text:style-name="T9">top</text:span></text:span>, use <text:span text:style-name="Strong_20_Emphasis"><text:span text:style-name="T9">Ctrl + C</text:span></text:span>; para suspender um processo, use <text:span text:style-name="Strong_20_Emphasis"><text:span text:style-name="T9">Ctrl + Z</text:span></text:span>.</text:p>
      <text:p text:style-name="P7"/>
      <text:p text:style-name="P7"><text:span text:style-name="T6">Exercício B:</text:span></text:p>
      <text:p text:style-name="P7"/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>E</text:span><text:span text:style-name="T6">xercício C:</text:span></text:p>
      <text:p text:style-name="P7"/>
      <text:p text:style-name="P8">O comando <text:span text:style-name="Strong_20_Emphasis"><text:span text:style-name="T9">ps</text:span></text:span> permite visualizar os processos em execução no Linux. Sem opções, exibe apenas os processos do terminal atual. O comando <text:span text:style-name="Strong_20_Emphasis"><text:span text:style-name="T9">ps aux</text:span></text:span> mostra todos os processos do sistema, incluindo informações como usuário, PID, uso de CPU, memória e comando executado. Já <text:span text:style-name="Strong_20_Emphasis"><text:span text:style-name="T9">ps -u &lt;usuário&gt;</text:span></text:span> exibe somente os processos pertencentes ao usuário especificado.</text:p>
      <text:p text:style-name="P7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6">Exercício D:</text:span> </text:p>
      <text:p text:style-name="P9"/>
      <text:p text:style-name="P27">O manual do comando <text:span text:style-name="Strong_20_Emphasis"><text:span text:style-name="T9">ps</text:span></text:span>, acessado por <text:span text:style-name="Strong_20_Emphasis"><text:span text:style-name="T9">man ps</text:span></text:span>, apresenta diversas opções de uso. O comando <text:span text:style-name="Strong_20_Emphasis"><text:span text:style-name="T9">ps aux</text:span></text:span> lista todos os processos em execução no sistema. Já <text:span text:style-name="Strong_20_Emphasis"><text:span text:style-name="T9">ps axjf</text:span></text:span> exibe os processos em formato de árvore, mostrando a relação entre processos pais e filhos. O comando <text:span text:style-name="Strong_20_Emphasis"><text:span text:style-name="T9">ps -U root -u root u</text:span></text:span> mostra informações detalhadas dos processos do usuário root. Por fim, <text:span text:style-name="Strong_20_Emphasis"><text:span text:style-name="T9">ps -ao pid,user,cmd</text:span></text:span> exibe todos os processos apresentando apenas o PID, o usuário e o comando executado.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21"><text:span text:style-name="T6"><text:line-break/><text:line-break/><text:line-break/></text:span></text:p>
      <text:p text:style-name="P21"><text:span text:style-name="T6"/></text:p>
      <text:p text:style-name="P21"><text:span text:style-name="T6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>Ex</text:span><text:span text:style-name="T6">ercício E:</text:span> 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pan text:style-name="T1">O comando </text:span><text:span text:style-name="Strong_20_Emphasis"><text:span text:style-name="T1">pidof firefox</text:span></text:span><text:span text:style-name="T1"> retorna vários números, pois o Firefox executa diversos processos simultaneamente, como os responsáveis pelas abas, extensões e outros recursos do navegador. Já o comando </text:span><text:span text:style-name="Strong_20_Emphasis"><text:span text:style-name="T1">pidof pico</text:span></text:span><text:span text:style-name="T1"> retorna apenas um número, correspondente ao identificador (PID) do processo do editor pico em execução.</text:span></text:p>
      <text:p text:style-name="P28"/>
      <text:p text:style-name="Text_20_body"><text:span text:style-name="T1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>Exercício F:</text:span><text:span text:style-name="T1"> </text:span></text:p>
      <text:p text:style-name="Text_20_body"><text:span text:style-name="T1"/></text:p>
      <text:p text:style-name="Text_20_body"><text:span text:style-name="T1"/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6">Exercício H:</text:span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6">Exercício I: </text:span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6">Exercício J:</text:span> 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6">Exercício K:</text:span> 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6">Exercício L:</text:span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8">Exercício </text:span><text:span text:style-name="T6">M:</text:span></text:p>
      <text:p text:style-name="P13"/>
      <text:p text:style-name="P13"/>
      <text:p text:style-name="P13"/>
      <text:p text:style-name="P13"/>
      <text:p text:style-name="P13"/>
      <text:p text:style-name="P19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AIAL" svg:font-family="ARAIAL"/>
    <style:font-face style:name="Araial" svg:font-family="Ara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2" fo:widows="2" fo:hyphenation-ladder-count="no-limit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fo:text-indent="-1.27cm" fo:margin-left="1.69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6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7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–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–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Rodapé">
      <style:paragraph-properties fo:text-align="center" style:justify-single-word="false"/>
    </style:style>
    <style:style style:name="MP2" style:family="paragraph" style:parent-style-name="Rodapé">
      <style:text-properties officeooo:paragraph-rsid="00346b96"/>
    </style:style>
    <style:style style:name="MT1" style:family="text"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onte_20_parág._20_padrão"><text:span text:style-name="MT1"/></text:span></text:p>
        <text:p text:style-name="Rodapé"/>
        <text:p text:style-name="Rodapé"/>
        <text:p text:style-name="MP2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Sediane Hernandes</meta:initial-creator>
    <meta:creation-date>2026-04-28T14:06:00Z</meta:creation-date>
    <dc:date>2026-06-23T19:29:36.400909852</dc:date>
    <meta:print-date>2020-03-15T16:16:00Z</meta:print-date>
    <meta:editing-cycles>25</meta:editing-cycles>
    <meta:editing-duration>PT1H21M15S</meta:editing-duration>
    <meta:document-statistic meta:table-count="1" meta:image-count="21" meta:object-count="0" meta:page-count="10" meta:paragraph-count="27" meta:word-count="352" meta:character-count="2218" meta:non-whitespace-character-count="1877"/>
    <meta:user-defined meta:name="AppVersion">16.0000</meta:user-defined>
    <meta:user-defined meta:name="DocSecurity" meta:value-type="float">0</meta:user-defined>
    <meta:user-defined meta:name="GrammarlyDocumentId">999d69d0-ddfa-4613-8750-8e03bb590f7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../Downloads/isaquecordeiroatv/isaquecordeiroatv.odt/Normal.dotm"/>
  </office:meta>
</office:document-meta>
</file>